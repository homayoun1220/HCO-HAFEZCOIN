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هنوز ۳۰٪ مقاله متعلق به Paper [12] است</text:h>
      <text:p text:style-name="Text_20_body">این هنوز بزرگ‌ترین مشکل مقاله است.</text:p>
      <text:p text:style-name="Text_20_body">Abstract از خط اول تا آخر دارد روی:</text:p>
      <text:p text:style-name="Quotations">parallelizable resources<text:line-break/>C(s,T)=o(sT)<text:line-break/>impossibility result</text:p>
      <text:p text:style-name="Text_20_body">مانور می‌دهد. </text:p>
      <text:p text:style-name="Text_20_body">Introduction هم همینطور. </text:p>
      <text:p text:style-name="Text_20_body">Conclusion هم همینطور. </text:p>
      <text:p text:style-name="Text_20_body">در حالی که الان مقاله [12] وجود دارد.</text:p>
      <text:p text:style-name="Text_20_body">اگر من داور باشم می‌گویم:</text:p>
      <text:p text:style-name="Quotations">چرا نصف مقاله دارید نتیجه مقاله قبلی خودتان را دوباره می‌فروشید؟</text:p>
      <text:p text:style-name="Text_20_body">الان ارجاع به [12] درست است، ولی هنوز بیش از حد در مرکز توجه است.</text:p>
      <text:p text:style-name="Horizontal_20_Line"/>
      <text:h text:style-name="Heading_20_1" text:outline-level="1">2. بهترین بخش مقاله شده Section V</text:h>
      <text:p text:style-name="Text_20_body">این قبلاً وجود نداشت.</text:p>
      <text:p text:style-name="Text_20_body">Commitment Score الان برای اولین بار حس می‌دهد یک contribution مستقل است. </text:p>
      <text:p text:style-name="Text_20_body">اما عجیب است که:</text:p>
      <text:list text:style-name="L1">
        <text:list-item>
          <text:p text:style-name="P1">۳ صفحه برای HCO داری </text:p>
        </text:list-item>
        <text:list-item>
          <text:p text:style-name="P2">۲ صفحه برای Commitment Score </text:p>
        </text:list-item>
      </text:list>
      <text:p text:style-name="Text_20_body">من برعکسش می‌کردم.</text:p>
      <text:p text:style-name="Text_20_body">چون اگر فردا HCO عوض شود، PoCmt هنوز زنده است.</text:p>
      <text:p text:style-name="Text_20_body">اما اگر Commitment Score را حذف کنی، کل PoCmt می‌میرد.</text:p>
      <text:p text:style-name="Horizontal_20_Line"/>
      <text:h text:style-name="Heading_20_1" text:outline-level="1"><text:soft-page-break/>3. هنوز یک سؤال داور بی‌جواب مانده</text:h>
      <text:p text:style-name="Text_20_body">این مهم‌ترین سؤال فنی است:</text:p>
      <text:p text:style-name="Quotations">چرا Commitment Score همین فرمول است؟</text:p>
      <text:p text:style-name="Text_20_body">الان فرمول را تعریف کرده‌ای:</text:p>
      <text:p text:style-name="Text_20_body">CSv​=αHv​+βPv​+γUv​ </text:p>
      <text:p text:style-name="Text_20_body">اما:</text:p>
      <text:list text:style-name="L2">
        <text:list-item>
          <text:p text:style-name="P3">چرا جمع خطی؟ </text:p>
        </text:list-item>
        <text:list-item>
          <text:p text:style-name="P3">چرا ضربی نیست؟ </text:p>
        </text:list-item>
        <text:list-item>
          <text:p text:style-name="P3">چرا H باید غالب باشد؟ </text:p>
        </text:list-item>
        <text:list-item>
          <text:p text:style-name="P4">چرا availability جداست؟ </text:p>
        </text:list-item>
      </text:list>
      <text:p text:style-name="Text_20_body">الان بیشتر شبیه design choice است تا theorem.</text:p>
      <text:p text:style-name="Horizontal_20_Line"/>
      <text:h text:style-name="Heading_20_1" text:outline-level="1">4. Security Analysis هنوز خیلی وابسته به Assumptionهاست</text:h>
      <text:p text:style-name="Text_20_body">این را داور TDSC احتمالاً خواهد دید.</text:p>
      <text:p text:style-name="Text_20_body">مثلاً:</text:p>
      <text:list text:style-name="L3">
        <text:list-item>
          <text:p text:style-name="P5">HCO integrity </text:p>
        </text:list-item>
        <text:list-item>
          <text:p text:style-name="P5">Honest participation </text:p>
        </text:list-item>
        <text:list-item>
          <text:p text:style-name="P6">Honest channel majority </text:p>
        </text:list-item>
      </text:list>
      <text:p text:style-name="Text_20_body">بعد بخش زیادی از اثبات‌ها روی همین‌ها سوارند.</text:p>
      <text:p text:style-name="Text_20_body">از نظر منطقی اشکال ندارد.</text:p>
      <text:p text:style-name="Text_20_body">ولی باید شفاف‌تر بگویی:</text:p>
      <text:p text:style-name="Quotations">این assumptions deployment assumptions هستند.</text:p>
      <text:p text:style-name="Text_20_body">وگرنه داور حس می‌کند theoremها تقریباً assumptionها را بازنویسی کرده‌اند.</text:p>
      <text:p text:style-name="Horizontal_20_Line"/>
      <text:h text:style-name="Heading_20_1" text:outline-level="1"><text:soft-page-break/>5. Evaluation بهتر شده ولی هنوز "سیستمی" نیست</text:h>
      <text:p text:style-name="Text_20_body">هفت آزمایش داری. این خیلی بهتر از قبل است. </text:p>
      <text:p text:style-name="Text_20_body">اما یک مشکل وجود دارد:</text:p>
      <text:p text:style-name="Text_20_body">تقریباً همه نمودارها از یک مدل تحلیلی واحد بیرون آمده‌اند.</text:p>
      <text:p text:style-name="Text_20_body">داور ممکن است بگوید:</text:p>
      <text:p text:style-name="Quotations">شما theory را simulate کرده‌اید.</text:p>
      <text:p text:style-name="Text_20_body">نه اینکه:</text:p>
      <text:p text:style-name="Quotations">protocol را ارزیابی کرده‌اید.</text:p>
      <text:p text:style-name="Text_20_body">من هنوز دوست داشتم یکی از این‌ها را ببینم:</text:p>
      <text:list text:style-name="L4">
        <text:list-item>
          <text:p text:style-name="P7">latency </text:p>
        </text:list-item>
        <text:list-item>
          <text:p text:style-name="P7">throughput </text:p>
        </text:list-item>
        <text:list-item>
          <text:p text:style-name="P7">message overhead </text:p>
        </text:list-item>
        <text:list-item>
          <text:p text:style-name="P7">storage growth </text:p>
        </text:list-item>
        <text:list-item>
          <text:p text:style-name="P8">bootstrap time </text:p>
        </text:list-item>
      </text:list>
      <text:p text:style-name="Horizontal_20_Line"/>
      <text:h text:style-name="Heading_20_1" text:outline-level="1">6. Newcomer Problem هنوز باز است</text:h>
      <text:p text:style-name="Text_20_body">خودت هم در Discussion اعتراف کرده‌ای. </text:p>
      <text:p text:style-name="Text_20_body">اگر من داور باشم می‌پرسم:</text:p>
      <text:p text:style-name="Quotations">من امروز وارد شبکه شدم.</text:p>
      <text:p text:style-name="Quotations">چرا اصلاً باید بتوانم رقابت کنم؟</text:p>
      <text:p text:style-name="Text_20_body">این الان future work نیست.</text:p>
      <text:p text:style-name="Text_20_body">به نظرم بخشی از خود پروتکل است.</text:p>
      <text:p text:style-name="Horizontal_20_Line"/>
      <text:h text:style-name="Heading_20_1" text:outline-level="1"><text:soft-page-break/>7. Adaptive Corruption حذف شده ولی هنوز جای خالی‌اش حس می‌شود</text:h>
      <text:p text:style-name="Text_20_body">الان صادقانه گفته‌ای که فقط static corruption را بررسی می‌کنی. </text:p>
      <text:p text:style-name="Text_20_body">این خوب است.</text:p>
      <text:p text:style-name="Text_20_body">ولی چون PoCmt روی accumulated commitment بنا شده، adaptive corruption خیلی مهم‌تر از PoW است.</text:p>
      <text:p text:style-name="Text_20_body">برای TDSC احتمالاً یکی از سؤال‌های اصلی داورها خواهد بود.</text:p>
      <text:p text:style-name="Horizontal_20_Line"/>
      <text:h text:style-name="Heading_20_1" text:outline-level="1">چیزی که نسبت به قبل خیلی بهتر شده</text:h>
      <text:p text:style-name="Text_20_body">این را جدی می‌گویم.</text:p>
      <text:p text:style-name="Text_20_body">من دیگر آن بحران هویت شدید قبلی را نمی‌بینم.</text:p>
      <text:p text:style-name="Text_20_body">الان وقتی Abstract و Contributions را می‌خوانم می‌فهمم:</text:p>
      <text:p text:style-name="Quotations">مقاله درباره PoCmt است.</text:p>
      <text:p text:style-name="Text_20_body">نه درباره HCO.</text:p>
      <text:p text:style-name="Text_20_body">نه درباره Geometry Paper.</text:p>
      <text:p text:style-name="Text_20_body">نه درباره Cost Theory.</text:p>
      <text:p text:style-name="Text_20_body">این پیشرفت بزرگی است. </text:p>
      <text:p text:style-name="Horizontal_20_Line"/>
      <text:p text:style-name="Text_20_body">اگر بخواهم برای ریویو TDSC رتبه‌بندی کنم:</text:p>
      <text:h text:style-name="Heading_20_3" text:outline-level="3">ایراد بحرانی</text:h>
      <text:list text:style-name="L5">
        <text:list-item>
          <text:p text:style-name="P9">وابستگی زیاد روایت مقاله به [12] </text:p>
        </text:list-item>
      </text:list>
      <text:h text:style-name="Heading_20_3" text:outline-level="3">ایراد مهم</text:h>
      <text:list text:style-name="L6">
        <text:list-item>
          <text:p text:style-name="P10">توجیه ضعیف Commitment Score </text:p>
        </text:list-item>
        <text:list-item>
          <text:p text:style-name="P11">Evaluation بیشتر analytical simulation تا system evaluation </text:p>
        </text:list-item>
      </text:list>
      <text:h text:style-name="Heading_20_3" text:outline-level="3">ایراد متوسط</text:h>
      <text:list text:style-name="L7">
        <text:list-item>
          <text:p text:style-name="P12">newcomer bootstrapping </text:p>
        </text:list-item>
        <text:list-item>
          <text:p text:style-name="P13"><text:soft-page-break/>adaptive corruption </text:p>
        </text:list-item>
      </text:list>
      <text:h text:style-name="Heading_20_3" text:outline-level="3">ایراد جزئی</text:h>
      <text:list text:style-name="L8">
        <text:list-item>
          <text:p text:style-name="P14">بعضی بخش‌های HCO هنوز طولانی‌تر از ارزش واقعی‌شان هستند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08:43:54.465615615</meta:creation-date>
    <dc:date>2026-06-22T08:44:36.479830129</dc:date>
    <meta:editing-duration>PT42S</meta:editing-duration>
    <meta:editing-cycles>1</meta:editing-cycles>
    <meta:document-statistic meta:table-count="0" meta:image-count="0" meta:object-count="0" meta:page-count="5" meta:paragraph-count="88" meta:word-count="503" meta:character-count="2771" meta:non-whitespace-character-count="2331"/>
    <meta:generator>LibreOffice/25.8.7.3$Linux_X86_64 LibreOffice_project/580$Build-3</meta:generator>
  </office:meta>
</office:document-meta>
</file>